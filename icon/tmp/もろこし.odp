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3E0000001B7FBACEC6C2BAD8C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0000" draw:textarea-horizontal-align="justify" draw:textarea-vertical-align="middle" draw:auto-grow-height="false" fo:min-height="0.75cm" fo:min-width="0.5cm"/>
      <style:paragraph-properties style:writing-mode="lr-tb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0.75cm" fo:min-width="0.5cm"/>
      <style:paragraph-properties style:writing-mode="lr-tb"/>
    </style:style>
    <style:style style:name="gr3" style:family="graphic" style:parent-style-name="objectwithoutfill">
      <style:graphic-properties draw:fill="solid" draw:fill-color="#ff0000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13.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25cm" fo:min-width="2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25cm" fo:min-width="0cm"/>
      <style:paragraph-properties style:writing-mode="lr-tb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0.25cm" fo:min-width="2.5cm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0.25cm" fo:min-width="2.5cm"/>
      <style:paragraph-properties style:writing-mode="lr-tb"/>
    </style:style>
    <style:style style:name="gr9" style:family="graphic" style:parent-style-name="standard" style:list-style-name="L1">
      <style:graphic-properties draw:textarea-horizontal-align="justify" draw:textarea-vertical-align="middle" draw:auto-grow-height="false" fo:min-height="0.25cm" fo:min-width="2.5cm"/>
      <style:paragraph-properties style:writing-mode="lr-tb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0.25cm" fo:min-width="2.5cm"/>
      <style:paragraph-properties style:writing-mode="lr-tb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0.25cm" fo:min-width="2.5cm"/>
      <style:paragraph-properties style:writing-mode="lr-tb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0.25cm" fo:min-width="2.5cm"/>
      <style:paragraph-properties style:writing-mode="lr-tb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0.25cm" fo:min-width="2.5cm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25cm" fo:min-width="2.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25cm" fo:min-width="10.5cm"/>
      <style:paragraph-properties style:writing-mode="lr-tb"/>
    </style:style>
    <style:style style:name="gr16" style:family="graphic" style:parent-style-name="standard">
      <style:graphic-properties svg:stroke-opacity="0%" draw:fill="none" draw:textarea-horizontal-align="justify" draw:textarea-vertical-align="middle" draw:auto-grow-height="false" fo:min-height="0.25cm" fo:min-width="3cm"/>
      <style:paragraph-properties style:writing-mode="lr-tb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12.25cm" fo:min-width="15.5cm"/>
    </style:style>
    <style:style style:name="gr18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textarea-horizontal-align="justify" draw:textarea-vertical-align="middle" draw:auto-grow-height="false" fo:min-height="0.25cm" fo:min-width="10.4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25cm" fo:min-width="1.839cm"/>
      <style:paragraph-properties style:writing-mode="lr-tb"/>
    </style:style>
    <style:style style:name="gr21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="solid" draw:fill-color="#ff0000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text-align="center" style:writing-mode="lr-tb"/>
      <style:text-properties fo:font-size="12pt"/>
    </style:style>
    <style:style style:name="P4" style:family="paragraph">
      <loext:graphic-properties draw:fill="solid" draw:fill-color="#ff0000"/>
      <style:paragraph-properties fo:text-align="center" style:writing-mode="lr-tb"/>
      <style:text-properties fo:font-size="12pt"/>
    </style:style>
    <style:style style:name="P5" style:family="paragraph">
      <loext:graphic-properties draw:fill-color="#ff0000"/>
      <style:paragraph-properties fo:text-align="center" style:writing-mode="lr-tb"/>
      <style:text-properties fo:font-size="12pt"/>
    </style:style>
    <style:style style:name="P6" style:family="paragraph">
      <loext:graphic-properties draw:fill="solid" draw:fill-color="#ff0000"/>
      <style:paragraph-properties fo:text-align="center"/>
      <style:text-properties fo:font-size="12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8" style:family="paragraph">
      <style:paragraph-properties fo:text-align="start" style:writing-mode="lr-tb"/>
      <style:text-properties fo:color="#c0c0c0" loext:opacity="100%" fo:font-size="12pt" style:font-size-asian="12pt" style:font-size-complex="12pt"/>
    </style:style>
    <style:style style:name="P9" style:family="paragraph">
      <style:paragraph-properties fo:text-align="center" style:writing-mode="lr-tb"/>
      <style:text-properties fo:color="#c0c0c0" loext:opacity="100%" fo:font-size="12pt"/>
    </style:style>
    <style:style style:name="P10" style:family="paragraph">
      <loext:graphic-properties draw:fill="none"/>
      <style:paragraph-properties fo:text-align="start" style:writing-mode="lr-tb"/>
      <style:text-properties fo:color="#c0c0c0" loext:opacity="100%" fo:font-size="12pt" style:font-size-asian="12pt" style:font-size-complex="12pt"/>
    </style:style>
    <style:style style:name="P11" style:family="paragraph">
      <style:paragraph-properties fo:text-align="start" style:writing-mode="lr-tb"/>
      <style:text-properties fo:color="#000000" loext:opacity="100%" fo:font-size="12pt" style:font-size-asian="12pt" style:font-size-complex="12pt"/>
    </style:style>
    <style:style style:name="P12" style:family="paragraph">
      <loext:graphic-properties draw:fill="none"/>
      <style:paragraph-properties fo:text-align="start" style:writing-mode="lr-tb"/>
      <style:text-properties fo:color="#000000" loext:opacity="100%" fo:font-size="12pt" style:font-size-asian="12pt" style:font-size-complex="1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style:paragraph-properties fo:text-align="start" style:writing-mode="lr-tb"/>
      <style:text-properties fo:font-size="12pt" style:font-size-asian="12pt" style:font-size-complex="12pt"/>
    </style:style>
    <style:style style:name="P16" style:family="paragraph">
      <loext:graphic-properties draw:fill-color="#ffffff"/>
      <style:paragraph-properties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/>
    </style:style>
    <style:style style:name="T3" style:family="text">
      <style:text-properties fo:color="#c0c0c0" loext:opacity="100%" fo:font-size="12pt" style:font-size-asian="12pt" style:font-size-complex="12pt"/>
    </style:style>
    <style:style style:name="T4" style:family="text">
      <style:text-properties fo:color="#000000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2" draw:layer="layout" svg:width="1cm" svg:height="1cm" svg:x="17cm" svg:y="2cm">
          <text:p text:style-name="P1"><text:span text:style-name="T1">Ope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4.1cm" svg:y="11.5cm">
          <text:p text:style-name="P3"><text:span text:style-name="T2">Undo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5.2cm" svg:y="11.5cm">
          <text:p text:style-name="P3"><text:span text:style-name="T2">Redo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8.8cm" svg:y="11.5cm">
          <text:p text:style-name="P3"><text:span text:style-name="T2">Play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6.3cm" svg:y="11.5cm">
          <text:p text:style-name="P3"><text:span text:style-name="T2">Rese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11cm" svg:y="11.5cm">
          <text:p text:style-name="P3"><text:span text:style-name="T2">AB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7cm" svg:y="6.3cm">
          <text:p text:style-name="P3"><text:span text:style-name="T2">Temp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6" draw:layer="layout" svg:x1="7.5cm" svg:y1="11.5cm" svg:x2="7.5cm" svg:y2="12.5cm">
          <text:p/>
        </draw:line>
        <draw:custom-shape draw:style-name="gr4" draw:text-style-name="P3" draw:layer="layout" svg:width="14cm" svg:height="1.5cm" svg:x="4cm" svg:y="8.8cm">
          <text:p text:style-name="P3"><text:span text:style-name="T2">（波形）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cm" svg:height="0.5cm" svg:x="4cm" svg:y="10.3cm">
          <text:p text:style-name="P3"><text:span text:style-name="T2">00:00.000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cm" svg:height="0.5cm" svg:x="15cm" svg:y="10.3cm">
          <text:p text:style-name="P3"><text:span text:style-name="T2">05:00.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cm" svg:height="1cm" svg:x="7.7cm" svg:y="11.5cm">
          <text:p text:style-name="P3"><text:span text:style-name="T2">Rew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9.9cm" svg:y="11.5cm">
          <text:p text:style-name="P3"><text:span text:style-name="T2">FF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4cm" svg:y="4.6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cm" svg:height="0.5cm" svg:x="4.6cm" svg:y="4.6cm">
          <text:p text:style-name="P7"><text:span text:style-name="T2">--:--.---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cm" svg:height="0.5cm" svg:x="7.7cm" svg:y="4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4cm" svg:y="5.2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cm" svg:height="0.5cm" svg:x="4.6cm" svg:y="5.2cm">
          <text:p text:style-name="P7"><text:span text:style-name="T2">--:--.---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cm" svg:height="0.5cm" svg:x="7.7cm" svg:y="5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4cm" svg:y="5.8cm">
          <text:p text:style-name="P3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cm" svg:height="0.5cm" svg:x="4.6cm" svg:y="5.8cm">
          <text:p text:style-name="P7"><text:span text:style-name="T2">--:--.---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cm" svg:height="0.5cm" svg:x="7.7cm" svg:y="5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4cm" svg:y="6.4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cm" svg:height="0.5cm" svg:x="4.6cm" svg:y="6.4cm">
          <text:p text:style-name="P7"><text:span text:style-name="T2">--:--.---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cm" svg:height="0.5cm" svg:x="7.7cm" svg:y="6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4cm" svg:y="7cm">
          <text:p text:style-name="P3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cm" svg:height="0.5cm" svg:x="4.6cm" svg:y="7cm">
          <text:p text:style-name="P7"><text:span text:style-name="T2">--:--.---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cm" svg:height="0.5cm" svg:x="7.7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4cm" svg:y="4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3cm" svg:height="0.5cm" svg:x="4.6cm" svg:y="4cm">
          <text:p text:style-name="P7"><text:span text:style-name="T2">--:--.---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cm" svg:height="0.5cm" svg:x="7.7cm" svg:y="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4cm" svg:y="3.4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cm" svg:height="0.5cm" svg:x="4.6cm" svg:y="3.4cm">
          <text:p text:style-name="P7"><text:span text:style-name="T2">--:--.---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cm" svg:height="0.5cm" svg:x="7.7cm" svg:y="3.4cm">
          <text:p text:style-name="P8"><text:span text:style-name="T3">コメント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4cm" svg:y="8.181cm">
          <text:p text:style-name="P3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3cm" svg:height="0.5cm" svg:x="4.6cm" svg:y="8.181cm">
          <text:p text:style-name="P7"><text:span text:style-name="T2">--:--.---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cm" svg:height="0.5cm" svg:x="7.7cm" svg:y="8.1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4cm" svg:y="7.581cm">
          <text:p text:style-name="P3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cm" svg:height="0.5cm" svg:x="4.6cm" svg:y="7.581cm">
          <text:p text:style-name="P3"><text:span text:style-name="T2">--:--.---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3cm" svg:height="0.5cm" svg:x="7.7cm" svg:y="7.58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1cm" svg:height="0.5cm" svg:x="5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3.5cm" svg:height="0.5cm" svg:x="3.9cm" svg:y="2cm">
          <text:p text:style-name="P8"><text:span text:style-name="T4">Folder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1cm" svg:height="0.5cm" svg:x="5.5cm" svg:y="2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3.5cm" svg:height="0.5cm" svg:x="3.901cm" svg:y="2.6cm">
          <text:p text:style-name="P8"><text:span text:style-name="T4">File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3.5cm" svg:height="0.5cm" svg:x="11.3cm" svg:y="5.8cm">
          <text:p text:style-name="P8"><text:span text:style-name="T4">Tempo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cm" svg:height="0.5cm" svg:x="13.2cm" svg:y="5.8cm">
          <text:p text:style-name="P3"><text:span text:style-name="T2">120.000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3.5cm" svg:height="0.5cm" svg:x="11.301cm" svg:y="6.4cm">
          <text:p text:style-name="P11"><text:span text:style-name="T4">Beat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cm" svg:height="0.5cm" svg:x="13.201cm" svg:y="6.4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3.5cm" svg:height="0.5cm" svg:x="11.302cm" svg:y="7cm">
          <text:p text:style-name="P8"><text:span text:style-name="T4">Ba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cm" svg:height="0.5cm" svg:x="13.202cm" svg:y="7cm">
          <text:p text:style-name="P3"><text:span text:style-name="T2">2.000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3.5cm" svg:height="0.5cm" svg:x="11.3cm" svg:y="5.2cm">
          <text:p text:style-name="P8"><text:span text:style-name="T4">Rew/FF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3.5cm" svg:height="0.5cm" svg:x="11.3cm" svg:y="7.6cm">
          <text:p text:style-name="P8"><text:span text:style-name="T4">60 / 120.000 * 4 * 2.000 = 4.000s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3.5cm" svg:height="0.5cm" svg:x="11.3cm" svg:y="5.2cm">
          <text:p text:style-name="P8"><text:span text:style-name="T4">Rew/FF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3.5cm" svg:height="0.5cm" svg:x="11.301cm" svg:y="3.4cm">
          <text:p text:style-name="P8"><text:span text:style-name="T4">Speed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cm" svg:height="0.5cm" svg:x="13.201cm" svg:y="3.4cm">
          <text:p text:style-name="P3"><text:span text:style-name="T2">x1.0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3.5cm" svg:height="0.5cm" svg:x="11.302cm" svg:y="4cm">
          <text:p text:style-name="P11"><text:span text:style-name="T4">Key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cm" svg:height="0.5cm" svg:x="13.201cm" svg:y="4cm">
          <text:p text:style-name="P3"><text:span text:style-name="T2">±0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6cm" svg:height="12.5cm" svg:x="3cm" svg:y="1.5cm">
          <text:p/>
          <draw:enhanced-geometry svg:viewBox="0 0 21600 21600" draw:type="rectangle" draw:enhanced-path="M 0 0 L 21600 0 21600 21600 0 21600 0 0 Z N"/>
        </draw:custom-shape>
        <draw:frame draw:style-name="gr18" draw:text-style-name="P14" draw:layer="layout" svg:width="2.299cm" svg:height="1cm" svg:x="15.661cm" svg:y="11.5cm">
          <draw:image xlink:href="Pictures/100000000000003E0000001B7FBACEC6C2BAD8C3.png" xlink:type="simple" xlink:show="embed" xlink:actuate="onLoad" draw:mime-type="image/png">
            <text:p/>
          </draw:image>
        </draw:frame>
        <draw:custom-shape draw:style-name="gr19" draw:text-style-name="P15" draw:layer="layout" svg:width="10.9cm" svg:height="0.5cm" svg:x="4.1cm" svg:y="12.6cm">
          <text:p text:style-name="P15"><text:span text:style-name="T1">メッセージ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2.339cm" svg:height="0.5cm" svg:x="15.661cm" svg:y="12.6cm">
          <text:p text:style-name="P3"><text:span text:style-name="T2">100%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1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6-03T15:02:38.660000000</meta:creation-date>
    <dc:date>2026-06-03T16:01:44.790000000</dc:date>
    <meta:editing-duration>PT41M18S</meta:editing-duration>
    <meta:editing-cycles>19</meta:editing-cycles>
    <meta:generator>LibreOffice/7.0.1.2$Windows_X86_64 LibreOffice_project/7cbcfc562f6eb6708b5ff7d7397325de9e764452</meta:generator>
    <meta:document-statistic meta:object-count="84"/>
  </office:meta>
</office:document-meta>
</file>